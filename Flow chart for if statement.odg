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32cm" fo:min-width="9.732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878cm" fo:min-width="3.628cm" loext:decorative="fals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6.782cm" loext:decorative="fals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54cm" fo:min-width="2.6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5cm" svg:height="2.75cm" svg:x="4.75cm" svg:y="3.5cm">
          <text:p text:style-name="P1">User not logged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cm" svg:y1="6.25cm" svg:x2="10.083cm" svg:y2="10.047cm" draw:start-shape="id1" draw:start-glue-point="2" svg:d="M10000 6250l83 3797" svg:viewBox="0 0 84 3798">
          <text:p/>
        </draw:connector>
        <draw:line draw:style-name="gr2" draw:text-style-name="P2" draw:layer="layout" svg:x1="4.642cm" svg:y1="10.108cm" svg:x2="14.892cm" svg:y2="10.108cm">
          <text:p/>
        </draw:line>
        <draw:line draw:style-name="gr3" draw:text-style-name="P2" draw:layer="layout" svg:x1="4.75cm" svg:y1="10cm" svg:x2="4.75cm" svg:y2="13cm">
          <text:p/>
        </draw:line>
        <draw:custom-shape draw:style-name="gr4" draw:text-style-name="P1" draw:layer="layout" svg:width="4.25cm" svg:height="1.25cm" svg:x="2.75cm" svg:y="13cm">
          <text:p text:style-name="P1">Log user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75cm" svg:y1="14.25cm" svg:x2="4.75cm" svg:y2="16.75cm">
          <text:p/>
        </draw:line>
        <draw:line draw:style-name="gr5" draw:text-style-name="P2" draw:layer="layout" svg:x1="4.75cm" svg:y1="16.75cm" svg:x2="9.75cm" svg:y2="16.75cm">
          <text:p/>
        </draw:line>
        <draw:custom-shape draw:style-name="gr6" draw:text-style-name="P1" draw:layer="layout" svg:width="7.5cm" svg:height="2.25cm" svg:x="9.75cm" svg:y="15.5cm">
          <text:p text:style-name="P1">Make Purc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4.75cm" svg:y1="10cm" svg:x2="14.75cm" svg:y2="15.5cm">
          <text:p/>
        </draw:line>
        <draw:custom-shape draw:style-name="gr8" draw:text-style-name="P3" draw:layer="layout" svg:width="3.5cm" svg:height="1cm" svg:x="5.5cm" svg:y="9cm">
          <text:p text:style-name="P1">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25cm" svg:height="1cm" svg:x="11cm" svg:y="9cm">
          <text:p text:style-name="P1">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7.838cm" svg:height="0.962cm" svg:x="6.25cm" svg:y="1.5cm">
          <draw:text-box>
            <text:p>Flow chart for If stateme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8:43:53.851325095</meta:creation-date>
    <dc:date>2026-04-02T08:51:45.001185174</dc:date>
    <meta:editing-duration>PT7M52S</meta:editing-duration>
    <meta:editing-cycles>1</meta:editing-cycles>
    <meta:document-statistic meta:object-count="12"/>
    <meta:generator>LibreOffice/24.2.7.2$Linux_X86_64 LibreOffice_project/420$Build-2</meta:generator>
  </office:meta>
</office:document-meta>
</file>